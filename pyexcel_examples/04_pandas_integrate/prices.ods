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yexcel_sheet1">
        <table:table-column/>
        <table:table-column/>
        <table:table-column/>
        <table:table-row>
          <table:table-cell office:value-type="string">
            <text:p>Наименование</text:p>
          </table:table-cell>
          <table:table-cell office:value-type="string">
            <text:p>Цена</text:p>
          </table:table-cell>
          <table:table-cell office:value-type="string">
            <text:p>Количество</text:p>
          </table:table-cell>
        </table:table-row>
        <table:table-row>
          <table:table-cell office:value-type="string">
            <text:p>Смартфон</text:p>
          </table:table-cell>
          <table:table-cell office:value="45000" office:value-type="float"/>
          <table:table-cell office:value="10" office:value-type="float"/>
        </table:table-row>
        <table:table-row>
          <table:table-cell office:value-type="string">
            <text:p>Ноутбук</text:p>
          </table:table-cell>
          <table:table-cell office:value="95000" office:value-type="float"/>
          <table:table-cell office:value="5" office:value-type="float"/>
        </table:table-row>
        <table:table-row>
          <table:table-cell office:value-type="string">
            <text:p>Наушники</text:p>
          </table:table-cell>
          <table:table-cell office:value="7000" office:value-type="float"/>
          <table:table-cell office:value="15" office:value-type="float"/>
        </table:table-row>
        <table:table-row>
          <table:table-cell office:value-type="string">
            <text:p>Монитор</text:p>
          </table:table-cell>
          <table:table-cell office:value="22000" office:value-type="float"/>
          <table:table-cell office:value="8" office:value-type="float"/>
        </table:table-row>
        <table:table-row>
          <table:table-cell office:value-type="string">
            <text:p>Мышь</text:p>
          </table:table-cell>
          <table:table-cell office:value="2500" office:value-type="float"/>
          <table:table-cell office:value="3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6-02T17:12:50.485095</meta:creation-date>
    <dc:date>2026-06-02T17:12:50.486327</dc:date>
    <meta:generator>http://pypi.python.org/pypi/ezodf/0.1.0$Python3.14.4 (main, Apr 14 2026, 14:26:14) [Clang 22.1.3 ]</meta:generator>
    <meta:document-statistic/>
    <meta:editing-cycles>1</meta:editing-cycles>
  </office:meta>
</office:document-meta>
</file>