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yexcel sheet">
        <table:table-column/>
        <table:table-column/>
        <table:table-column/>
        <table:table-column/>
        <table:table-column/>
        <table:table-row>
          <table:table-cell office:value-type="string">
            <text:p>Region</text:p>
          </table:table-cell>
          <table:table-cell office:value-type="string">
            <text:p>Sales Q1</text:p>
          </table:table-cell>
          <table:table-cell office:value-type="string">
            <text:p>Sales Q2</text:p>
          </table:table-cell>
          <table:table-cell office:value-type="string">
            <text:p>Sales Q3</text:p>
          </table:table-cell>
          <table:table-cell office:value-type="string">
            <text:p>Sales Q4</text:p>
          </table:table-cell>
        </table:table-row>
        <table:table-row>
          <table:table-cell office:value-type="string">
            <text:p>North</text:p>
          </table:table-cell>
          <table:table-cell office:value="100000" office:value-type="float"/>
          <table:table-cell office:value="120000" office:value-type="float"/>
          <table:table-cell office:value="115000" office:value-type="float"/>
          <table:table-cell office:value="130000" office:value-type="float"/>
        </table:table-row>
        <table:table-row>
          <table:table-cell office:value-type="string">
            <text:p>South</text:p>
          </table:table-cell>
          <table:table-cell office:value="80000" office:value-type="float"/>
          <table:table-cell office:value="85000" office:value-type="float"/>
          <table:table-cell office:value="90000" office:value-type="float"/>
          <table:table-cell office:value="95000" office:value-type="float"/>
        </table:table-row>
        <table:table-row>
          <table:table-cell office:value-type="string">
            <text:p>East</text:p>
          </table:table-cell>
          <table:table-cell office:value="110000" office:value-type="float"/>
          <table:table-cell office:value="105000" office:value-type="float"/>
          <table:table-cell office:value="120000" office:value-type="float"/>
          <table:table-cell office:value="125000" office:value-type="float"/>
        </table:table-row>
        <table:table-row>
          <table:table-cell office:value-type="string">
            <text:p>West</text:p>
          </table:table-cell>
          <table:table-cell office:value="95000" office:value-type="float"/>
          <table:table-cell office:value="100000" office:value-type="float"/>
          <table:table-cell office:value="105000" office:value-type="float"/>
          <table:table-cell office:value="11000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6-05T12:49:28.287387</meta:creation-date>
    <dc:date>2026-06-05T12:49:28.288876</dc:date>
    <meta:generator>http://pypi.python.org/pypi/ezodf/0.1.0$Python3.14.4 (main, Apr 14 2026, 14:26:14) [Clang 22.1.3 ]</meta:generator>
    <meta:document-statistic/>
    <meta:editing-cycles>1</meta:editing-cycles>
  </office:meta>
</office:document-meta>
</file>